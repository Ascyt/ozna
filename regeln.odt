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26000000262A52589D.png" manifest:media-type="image/png"/>
  <manifest:file-entry manifest:full-path="Pictures/1000000100000026000000262F237FEA.png" manifest:media-type="image/png"/>
  <manifest:file-entry manifest:full-path="Pictures/10000001000000260000002BD499F344.png" manifest:media-type="image/png"/>
  <manifest:file-entry manifest:full-path="Pictures/100000010000006B000000660136E7C4.png" manifest:media-type="image/png"/>
  <manifest:file-entry manifest:full-path="Pictures/1000000100000059000000764CA302DC.png" manifest:media-type="image/png"/>
  <manifest:file-entry manifest:full-path="Pictures/100000010000006600000066F596B13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language="de" fo:country="AT" style:text-underline-style="none" fo:font-weight="bold" officeooo:rsid="001ce93f" officeooo:paragraph-rsid="001ce93f" style:font-weight-asian="bold" style:font-weight-complex="bold" style:script-type="latin"/>
    </style:style>
    <style:style style:name="P2" style:family="paragraph" style:parent-style-name="Standard">
      <style:paragraph-properties fo:text-align="center" style:justify-single-word="false"/>
      <style:text-properties style:font-name="Arial1" fo:language="de" fo:country="AT" fo:font-style="italic" style:text-underline-style="none" fo:font-weight="bold" officeooo:rsid="00c3310d" officeooo:paragraph-rsid="00c3310d" style:font-style-asian="italic" style:font-weight-asian="bold" style:font-style-complex="italic" style:font-weight-complex="bold" style:script-type="latin"/>
    </style:style>
    <style:style style:name="P3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1ce93f" officeooo:paragraph-rsid="001ce93f" style:font-style-asian="normal" style:font-weight-asian="normal" style:font-style-complex="normal" style:font-weight-complex="normal" style:script-type="latin"/>
    </style:style>
    <style:style style:name="P4" style:family="paragraph" style:parent-style-name="Standard">
      <style:paragraph-properties fo:text-align="start" style:justify-single-word="false"/>
      <style:text-properties style:font-name="Arial1" fo:language="de" fo:country="AT" fo:font-style="italic" style:text-underline-style="solid" style:text-underline-width="auto" style:text-underline-color="font-color" fo:font-weight="normal" officeooo:rsid="001ce93f" officeooo:paragraph-rsid="001ce93f" style:font-style-asian="italic" style:font-weight-asian="normal" style:font-style-complex="italic" style:font-weight-complex="normal" style:script-type="latin"/>
    </style:style>
    <style:style style:name="P5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2b26c7" officeooo:paragraph-rsid="002b26c7" style:font-style-asian="normal" style:font-weight-asian="normal" style:font-style-complex="normal" style:font-weight-complex="normal" style:script-type="latin"/>
    </style:style>
    <style:style style:name="P6" style:family="paragraph" style:parent-style-name="Standard">
      <style:paragraph-properties fo:text-align="start" style:justify-single-word="false"/>
      <style:text-properties fo:language="de" fo:country="AT" officeooo:rsid="001d1489" officeooo:paragraph-rsid="001d1489" style:script-type="latin"/>
    </style:style>
    <style:style style:name="P7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260657" officeooo:paragraph-rsid="00260657" style:font-style-asian="normal" style:font-weight-asian="normal" style:font-style-complex="normal" style:font-weight-complex="normal" style:script-type="latin"/>
    </style:style>
    <style:style style:name="P8" style:family="paragraph" style:parent-style-name="Standard">
      <style:paragraph-properties fo:text-align="start" style:justify-single-word="false"/>
      <style:text-properties officeooo:paragraph-rsid="00303c19"/>
    </style:style>
    <style:style style:name="P9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38c5b3" officeooo:paragraph-rsid="00303c19" style:font-style-asian="normal" style:font-weight-asian="normal" style:font-style-complex="normal" style:font-weight-complex="normal" style:script-type="latin"/>
    </style:style>
    <style:style style:name="P10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bold" officeooo:rsid="0038ce70" officeooo:paragraph-rsid="0038ce70" style:font-style-asian="normal" style:font-weight-asian="bold" style:font-style-complex="normal" style:font-weight-complex="bold" style:script-type="latin"/>
    </style:style>
    <style:style style:name="P11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3983c2" officeooo:paragraph-rsid="0038ce70" style:font-style-asian="normal" style:font-weight-asian="normal" style:font-style-complex="normal" style:font-weight-complex="normal" style:script-type="latin"/>
    </style:style>
    <style:style style:name="P12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5db279" officeooo:paragraph-rsid="005db279" style:font-style-asian="normal" style:font-weight-asian="normal" style:font-style-complex="normal" style:font-weight-complex="normal" style:script-type="latin"/>
    </style:style>
    <style:style style:name="P13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856509" officeooo:paragraph-rsid="00856509" style:font-style-asian="normal" style:font-weight-asian="normal" style:font-style-complex="normal" style:font-weight-complex="normal" style:script-type="latin"/>
    </style:style>
    <style:style style:name="P14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6335e4" officeooo:paragraph-rsid="01073774" style:font-style-asian="normal" style:font-weight-asian="normal" style:font-style-complex="normal" style:font-weight-complex="normal" style:script-type="latin"/>
    </style:style>
    <style:style style:name="P15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6335e4" officeooo:paragraph-rsid="00ff4b86" style:font-style-asian="normal" style:font-weight-asian="normal" style:font-style-complex="normal" style:font-weight-complex="normal" style:script-type="latin"/>
    </style:style>
    <style:style style:name="P16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6335e4" officeooo:paragraph-rsid="0101266b" style:font-style-asian="normal" style:font-weight-asian="normal" style:font-style-complex="normal" style:font-weight-complex="normal" style:script-type="latin"/>
    </style:style>
    <style:style style:name="P17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6335e4" officeooo:paragraph-rsid="006c71cd" style:font-style-asian="normal" style:font-weight-asian="normal" style:font-style-complex="normal" style:font-weight-complex="normal" style:script-type="latin"/>
    </style:style>
    <style:style style:name="P18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64db9c" officeooo:paragraph-rsid="00856509" style:font-style-asian="normal" style:font-weight-asian="normal" style:font-style-complex="normal" style:font-weight-complex="normal" style:script-type="latin"/>
    </style:style>
    <style:style style:name="P19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715b92" officeooo:paragraph-rsid="00878cdc" style:font-style-asian="normal" style:font-weight-asian="normal" style:font-style-complex="normal" style:font-weight-complex="normal" style:script-type="latin"/>
    </style:style>
    <style:style style:name="P20" style:family="paragraph" style:parent-style-name="Standard">
      <style:paragraph-properties fo:text-align="start" style:justify-single-word="false"/>
      <style:text-properties style:font-name="Arial1" fo:language="de" fo:country="AT" fo:font-style="italic" style:text-underline-style="solid" style:text-underline-width="auto" style:text-underline-color="font-color" fo:font-weight="normal" officeooo:rsid="0038ce70" officeooo:paragraph-rsid="0038ce70" style:font-style-asian="italic" style:font-weight-asian="normal" style:font-style-complex="italic" style:font-weight-complex="normal" style:script-type="latin"/>
    </style:style>
    <style:style style:name="P21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35e9f0" officeooo:paragraph-rsid="0038ce70" style:font-style-asian="normal" style:font-weight-asian="normal" style:font-style-complex="normal" style:font-weight-complex="normal" style:script-type="latin"/>
    </style:style>
    <style:style style:name="P22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4240c8" officeooo:paragraph-rsid="004240c8" style:font-style-asian="normal" style:font-weight-asian="normal" style:font-style-complex="normal" style:font-weight-complex="normal" style:script-type="latin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4240c8"/>
    </style:style>
    <style:style style:name="P24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4ac65d" officeooo:paragraph-rsid="004240c8" style:font-style-asian="normal" style:font-weight-asian="normal" style:font-style-complex="normal" style:font-weight-complex="normal" style:script-type="latin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4c8b50"/>
    </style:style>
    <style:style style:name="P26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7741e6" officeooo:paragraph-rsid="004c8b50" style:font-style-asian="normal" style:font-weight-asian="normal" style:font-style-complex="normal" style:font-weight-complex="normal" style:script-type="latin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7741e6" officeooo:paragraph-rsid="004c8b50" style:font-style-asian="normal" style:font-weight-asian="normal" style:font-style-complex="normal" style:font-weight-complex="normal" style:script-type="latin"/>
    </style:style>
    <style:style style:name="P28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4d709b" officeooo:paragraph-rsid="004d709b" style:font-style-asian="normal" style:font-weight-asian="normal" style:font-style-complex="normal" style:font-weight-complex="normal" style:script-type="latin"/>
    </style:style>
    <style:style style:name="P29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7e1992" officeooo:paragraph-rsid="004d709b" style:font-style-asian="normal" style:font-weight-asian="normal" style:font-style-complex="normal" style:font-weight-complex="normal" style:script-type="latin"/>
    </style:style>
    <style:style style:name="P30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8113e7" officeooo:paragraph-rsid="008113e7" style:font-style-asian="normal" style:font-weight-asian="normal" style:font-style-complex="normal" style:font-weight-complex="normal" style:script-type="latin"/>
    </style:style>
    <style:style style:name="P31" style:family="paragraph" style:parent-style-name="Standard">
      <style:paragraph-properties fo:text-align="start" style:justify-single-word="false"/>
      <style:text-properties style:font-name="Arial1" fo:language="de" fo:country="AT" fo:font-style="italic" style:text-underline-style="solid" style:text-underline-width="auto" style:text-underline-color="font-color" fo:font-weight="normal" officeooo:rsid="00adee63" officeooo:paragraph-rsid="008113e7" style:font-style-asian="italic" style:font-weight-asian="normal" style:font-style-complex="italic" style:font-weight-complex="normal" style:script-type="latin"/>
    </style:style>
    <style:style style:name="P32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adee63" officeooo:paragraph-rsid="008113e7" style:font-style-asian="normal" style:font-weight-asian="normal" style:font-style-complex="normal" style:font-weight-complex="normal" style:script-type="latin"/>
    </style:style>
    <style:style style:name="P33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c5ba34" officeooo:paragraph-rsid="00c5ba34" style:font-style-asian="normal" style:font-weight-asian="normal" style:font-style-complex="normal" style:font-weight-complex="normal" style:script-type="latin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bold" officeooo:rsid="00c83b41" officeooo:paragraph-rsid="00cb61c9" style:font-style-asian="normal" style:font-weight-asian="bold" style:font-style-complex="normal" style:font-weight-complex="bold" style:script-type="latin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e6ff5c" officeooo:paragraph-rsid="00e6ff5c" style:font-style-asian="normal" style:font-weight-asian="normal" style:font-style-complex="normal" style:font-weight-complex="normal" style:script-type="latin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bold" officeooo:rsid="00e6ff5c" officeooo:paragraph-rsid="00e6ff5c" style:font-style-asian="normal" style:font-weight-asian="bold" style:font-style-complex="normal" style:font-weight-complex="bold" style:script-type="latin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ea4051" officeooo:paragraph-rsid="00ea4051" style:font-style-asian="normal" style:font-weight-asian="normal" style:font-style-complex="normal" style:font-weight-complex="normal" style:script-type="latin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cbafc4" officeooo:paragraph-rsid="00cb61c9" style:font-style-asian="normal" style:font-weight-asian="normal" style:font-style-complex="normal" style:font-weight-complex="normal" style:script-type="latin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bold" officeooo:rsid="00d66886" officeooo:paragraph-rsid="00d66886" style:font-style-asian="normal" style:font-weight-asian="bold" style:font-style-complex="normal" style:font-weight-complex="bold" style:script-type="latin"/>
    </style:style>
    <style:style style:name="P40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11083d5" officeooo:paragraph-rsid="00adee63" style:font-style-asian="normal" style:font-weight-asian="normal" style:font-style-complex="normal" style:font-weight-complex="normal" style:script-type="latin"/>
    </style:style>
    <style:style style:name="P41" style:family="paragraph" style:parent-style-name="Standard">
      <style:paragraph-properties fo:text-align="start" style:justify-single-word="false"/>
      <style:text-properties style:font-name="Arial1" fo:language="de" fo:country="AT" fo:font-style="italic" style:text-underline-style="solid" style:text-underline-width="auto" style:text-underline-color="font-color" fo:font-weight="normal" officeooo:rsid="00adee63" officeooo:paragraph-rsid="00adee63" style:font-style-asian="italic" style:font-weight-asian="normal" style:font-style-complex="italic" style:font-weight-complex="normal" style:script-type="latin"/>
    </style:style>
    <style:style style:name="P42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10d7feb" officeooo:paragraph-rsid="00adee63" style:font-style-asian="normal" style:font-weight-asian="normal" style:font-style-complex="normal" style:font-weight-complex="normal" style:script-type="latin"/>
    </style:style>
    <style:style style:name="P43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10e7955" officeooo:paragraph-rsid="010e7955" style:font-style-asian="normal" style:font-weight-asian="normal" style:font-style-complex="normal" style:font-weight-complex="normal" style:script-type="latin"/>
    </style:style>
    <style:style style:name="P44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adee63" officeooo:paragraph-rsid="00adee63" style:font-style-asian="normal" style:font-weight-asian="normal" style:font-style-complex="normal" style:font-weight-complex="normal" style:script-type="latin"/>
    </style:style>
    <style:style style:name="P45" style:family="paragraph" style:parent-style-name="Standard">
      <style:paragraph-properties fo:text-align="start" style:justify-single-word="false"/>
      <style:text-properties style:font-name="Arial1" fo:language="de" fo:country="AT" fo:font-style="italic" style:text-underline-style="solid" style:text-underline-width="auto" style:text-underline-color="font-color" fo:font-weight="normal" officeooo:rsid="00b08bf5" officeooo:paragraph-rsid="00b08bf5" style:font-style-asian="italic" style:font-weight-asian="normal" style:font-style-complex="italic" style:font-weight-complex="normal" style:script-type="latin"/>
    </style:style>
    <style:style style:name="P46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b08bf5" officeooo:paragraph-rsid="00b08bf5" style:font-style-asian="normal" style:font-weight-asian="normal" style:font-style-complex="normal" style:font-weight-complex="normal" style:script-type="latin"/>
    </style:style>
    <style:style style:name="P47" style:family="paragraph" style:parent-style-name="Standard">
      <style:paragraph-properties fo:text-align="start" style:justify-single-word="false"/>
      <style:text-properties style:font-name="Arial1" fo:language="de" fo:country="AT" fo:font-style="italic" style:text-underline-style="solid" style:text-underline-width="auto" style:text-underline-color="font-color" fo:font-weight="normal" officeooo:rsid="00ae189f" officeooo:paragraph-rsid="00ae189f" style:font-style-asian="italic" style:font-weight-asian="normal" style:font-style-complex="italic" style:font-weight-complex="normal" style:script-type="latin"/>
    </style:style>
    <style:style style:name="P48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ae189f" officeooo:paragraph-rsid="00ae189f" style:font-style-asian="normal" style:font-weight-asian="normal" style:font-style-complex="normal" style:font-weight-complex="normal" style:script-type="latin"/>
    </style:style>
    <style:style style:name="T1" style:family="text">
      <style:text-properties officeooo:rsid="00bbafac"/>
    </style:style>
    <style:style style:name="T2" style:family="text">
      <style:text-properties style:font-name="Arial1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Arial1" fo:font-style="normal" style:text-underline-style="none" fo:font-weight="normal" officeooo:rsid="0023208b" style:font-style-asian="normal" style:font-weight-asian="normal" style:font-style-complex="normal" style:font-weight-complex="normal"/>
    </style:style>
    <style:style style:name="T4" style:family="text">
      <style:text-properties style:font-name="Arial1" fo:font-style="normal" style:text-underline-style="none" fo:font-weight="normal" officeooo:rsid="0024cb70" style:font-style-asian="normal" style:font-weight-asian="normal" style:font-style-complex="normal" style:font-weight-complex="normal"/>
    </style:style>
    <style:style style:name="T5" style:family="text">
      <style:text-properties style:font-name="Arial1" fo:font-style="normal" style:text-underline-style="none" fo:font-weight="normal" officeooo:rsid="001d418c" style:font-style-asian="normal" style:font-weight-asian="normal" style:font-style-complex="normal" style:font-weight-complex="normal"/>
    </style:style>
    <style:style style:name="T6" style:family="text">
      <style:text-properties style:font-name="Arial1" fo:font-style="normal" style:text-underline-style="none" fo:font-weight="normal" officeooo:rsid="0034358f" style:font-style-asian="normal" style:font-weight-asian="normal" style:font-style-complex="normal" style:font-weight-complex="normal"/>
    </style:style>
    <style:style style:name="T7" style:family="text">
      <style:text-properties style:font-name="Arial1" fo:font-style="normal" style:text-underline-style="none" fo:font-weight="normal" officeooo:rsid="001e2de1" style:font-style-asian="normal" style:font-weight-asian="normal" style:font-style-complex="normal" style:font-weight-complex="normal"/>
    </style:style>
    <style:style style:name="T8" style:family="text">
      <style:text-properties style:font-name="Arial1" fo:font-style="normal" style:text-underline-style="none" fo:font-weight="normal" officeooo:rsid="00260657" style:font-style-asian="normal" style:font-weight-asian="normal" style:font-style-complex="normal" style:font-weight-complex="normal"/>
    </style:style>
    <style:style style:name="T9" style:family="text">
      <style:text-properties fo:font-weight="bold" officeooo:rsid="00303c19" style:font-weight-asian="bold" style:font-weight-complex="bold"/>
    </style:style>
    <style:style style:name="T10" style:family="text">
      <style:text-properties officeooo:rsid="00303c19"/>
    </style:style>
    <style:style style:name="T11" style:family="text">
      <style:text-properties officeooo:rsid="002b26c7"/>
    </style:style>
    <style:style style:name="T12" style:family="text">
      <style:text-properties officeooo:rsid="002d2168"/>
    </style:style>
    <style:style style:name="T13" style:family="text">
      <style:text-properties officeooo:rsid="002d9db4"/>
    </style:style>
    <style:style style:name="T14" style:family="text">
      <style:text-properties officeooo:rsid="002ee318"/>
    </style:style>
    <style:style style:name="T15" style:family="text">
      <style:text-properties officeooo:rsid="00715b92"/>
    </style:style>
    <style:style style:name="T16" style:family="text">
      <style:text-properties fo:font-weight="bold" officeooo:rsid="00715b92" style:font-weight-asian="bold" style:font-weight-complex="bold"/>
    </style:style>
    <style:style style:name="T17" style:family="text">
      <style:text-properties officeooo:rsid="007c2b2a"/>
    </style:style>
    <style:style style:name="T18" style:family="text">
      <style:text-properties style:font-name="Arial1" fo:language="de" fo:country="AT" fo:font-style="normal" style:text-underline-style="none" fo:font-weight="bold" officeooo:rsid="00303c19" style:font-style-asian="normal" style:font-weight-asian="bold" style:font-style-complex="normal" style:font-weight-complex="bold" style:script-type="latin"/>
    </style:style>
    <style:style style:name="T19" style:family="text">
      <style:text-properties style:font-name="Arial1" fo:language="de" fo:country="AT" fo:font-style="normal" style:text-underline-style="none" fo:font-weight="normal" officeooo:rsid="00303c19" style:font-style-asian="normal" style:font-weight-asian="normal" style:font-style-complex="normal" style:font-weight-complex="normal" style:script-type="latin"/>
    </style:style>
    <style:style style:name="T20" style:family="text">
      <style:text-properties style:font-name="Arial1" fo:language="de" fo:country="AT" fo:font-style="normal" style:text-underline-style="none" fo:font-weight="normal" officeooo:rsid="003215b4" style:font-style-asian="normal" style:font-weight-asian="normal" style:font-style-complex="normal" style:font-weight-complex="normal" style:script-type="latin"/>
    </style:style>
    <style:style style:name="T21" style:family="text">
      <style:text-properties style:font-name="Arial1" fo:language="de" fo:country="AT" fo:font-style="normal" style:text-underline-style="none" fo:font-weight="normal" officeooo:rsid="0037a4dd" style:font-style-asian="normal" style:font-weight-asian="normal" style:font-style-complex="normal" style:font-weight-complex="normal" style:script-type="latin"/>
    </style:style>
    <style:style style:name="T22" style:family="text">
      <style:text-properties style:font-name="Arial1" fo:language="de" fo:country="AT" fo:font-style="normal" style:text-underline-style="none" fo:font-weight="normal" officeooo:rsid="0033179d" style:font-style-asian="normal" style:font-weight-asian="normal" style:font-style-complex="normal" style:font-weight-complex="normal" style:script-type="latin"/>
    </style:style>
    <style:style style:name="T23" style:family="text">
      <style:text-properties style:font-name="Arial1" fo:language="de" fo:country="AT" fo:font-style="italic" style:text-underline-style="none" fo:font-weight="normal" officeooo:rsid="00d366ee" style:font-style-asian="italic" style:font-weight-asian="normal" style:font-style-complex="italic" style:font-weight-complex="normal" style:script-type="latin"/>
    </style:style>
    <style:style style:name="T24" style:family="text">
      <style:text-properties style:font-name="Arial1" fo:language="de" fo:country="AT" fo:font-style="italic" style:text-underline-style="none" fo:font-weight="normal" officeooo:rsid="0033179d" style:font-style-asian="italic" style:font-weight-asian="normal" style:font-style-complex="italic" style:font-weight-complex="normal" style:script-type="latin"/>
    </style:style>
    <style:style style:name="T25" style:family="text">
      <style:text-properties style:font-name="Arial1" fo:language="de" fo:country="AT" fo:font-style="normal" style:text-underline-style="none" fo:font-weight="normal" officeooo:rsid="0035cda4" style:font-style-asian="normal" style:font-weight-asian="normal" style:font-style-complex="normal" style:font-weight-complex="normal" style:script-type="latin"/>
    </style:style>
    <style:style style:name="T26" style:family="text">
      <style:text-properties style:font-name="Arial1" fo:language="de" fo:country="AT" fo:font-style="normal" style:text-underline-style="none" fo:font-weight="normal" officeooo:rsid="0034358f" style:font-style-asian="normal" style:font-weight-asian="normal" style:font-style-complex="normal" style:font-weight-complex="normal" style:script-type="latin"/>
    </style:style>
    <style:style style:name="T27" style:family="text">
      <style:text-properties style:font-name="Arial1" fo:language="de" fo:country="AT" fo:font-style="normal" style:text-underline-style="none" fo:font-weight="normal" officeooo:rsid="0034a796" style:font-style-asian="normal" style:font-weight-asian="normal" style:font-style-complex="normal" style:font-weight-complex="normal" style:script-type="latin"/>
    </style:style>
    <style:style style:name="T28" style:family="text">
      <style:text-properties style:font-name="Arial1" fo:language="de" fo:country="AT" fo:font-style="normal" style:text-underline-style="none" fo:font-weight="normal" officeooo:rsid="00c9dbd5" style:font-style-asian="normal" style:font-weight-asian="normal" style:font-style-complex="normal" style:font-weight-complex="normal" style:script-type="latin"/>
    </style:style>
    <style:style style:name="T29" style:family="text">
      <style:text-properties style:font-name="Arial1" fo:language="de" fo:country="AT" fo:font-style="normal" style:text-underline-style="none" fo:font-weight="normal" officeooo:rsid="0035e9f0" style:font-style-asian="normal" style:font-weight-asian="normal" style:font-style-complex="normal" style:font-weight-complex="normal" style:script-type="latin"/>
    </style:style>
    <style:style style:name="T30" style:family="text">
      <style:text-properties style:font-name="Arial1" fo:language="de" fo:country="AT" fo:font-style="normal" style:text-underline-style="none" fo:font-weight="normal" officeooo:rsid="00378bf4" style:font-style-asian="normal" style:font-weight-asian="normal" style:font-style-complex="normal" style:font-weight-complex="normal" style:script-type="latin"/>
    </style:style>
    <style:style style:name="T31" style:family="text">
      <style:text-properties style:font-name="Arial1" fo:language="de" fo:country="AT" fo:font-style="italic" style:text-underline-style="none" fo:font-weight="normal" officeooo:rsid="0035e9f0" style:font-style-asian="italic" style:font-weight-asian="normal" style:font-style-complex="italic" style:font-weight-complex="normal" style:script-type="latin"/>
    </style:style>
    <style:style style:name="T32" style:family="text">
      <style:text-properties style:font-name="Arial1" fo:language="de" fo:country="AT" fo:font-style="italic" style:text-underline-style="none" fo:font-weight="bold" officeooo:rsid="0035e9f0" style:font-style-asian="italic" style:font-weight-asian="bold" style:font-style-complex="italic" style:font-weight-complex="bold" style:script-type="latin"/>
    </style:style>
    <style:style style:name="T33" style:family="text">
      <style:text-properties style:font-name="Arial1" fo:language="de" fo:country="AT" fo:font-style="normal" style:text-underline-style="none" fo:font-weight="normal" officeooo:rsid="0038c5b3" style:font-style-asian="normal" style:font-weight-asian="normal" style:font-style-complex="normal" style:font-weight-complex="normal" style:script-type="latin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3c5815" style:font-weight-asian="normal" style:font-weight-complex="normal"/>
    </style:style>
    <style:style style:name="T36" style:family="text">
      <style:text-properties fo:font-weight="normal" officeooo:rsid="003983c2" style:font-weight-asian="normal" style:font-weight-complex="normal"/>
    </style:style>
    <style:style style:name="T37" style:family="text">
      <style:text-properties fo:font-weight="normal" officeooo:rsid="003a8614" style:font-weight-asian="normal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602402"/>
    </style:style>
    <style:style style:name="T40" style:family="text">
      <style:text-properties officeooo:rsid="0060542d"/>
    </style:style>
    <style:style style:name="T41" style:family="text">
      <style:text-properties officeooo:rsid="005fca41"/>
    </style:style>
    <style:style style:name="T42" style:family="text">
      <style:text-properties officeooo:rsid="00a91d3a"/>
    </style:style>
    <style:style style:name="T43" style:family="text">
      <style:text-properties officeooo:rsid="0064db9c"/>
    </style:style>
    <style:style style:name="T44" style:family="text">
      <style:text-properties officeooo:rsid="0086e4f9"/>
    </style:style>
    <style:style style:name="T45" style:family="text">
      <style:text-properties fo:font-weight="bold" officeooo:rsid="0064db9c" style:font-weight-asian="bold" style:font-weight-complex="bold"/>
    </style:style>
    <style:style style:name="T46" style:family="text">
      <style:text-properties officeooo:rsid="00790bcb"/>
    </style:style>
    <style:style style:name="T47" style:family="text">
      <style:text-properties officeooo:rsid="006c71cd"/>
    </style:style>
    <style:style style:name="T48" style:family="text">
      <style:text-properties officeooo:rsid="00a9c5f6"/>
    </style:style>
    <style:style style:name="T49" style:family="text">
      <style:text-properties officeooo:rsid="00a9e6b7"/>
    </style:style>
    <style:style style:name="T50" style:family="text">
      <style:text-properties officeooo:rsid="00ac246f"/>
    </style:style>
    <style:style style:name="T51" style:family="text">
      <style:text-properties fo:font-weight="bold" officeooo:rsid="00a9c5f6" style:font-weight-asian="bold" style:font-weight-complex="bold"/>
    </style:style>
    <style:style style:name="T52" style:family="text">
      <style:text-properties officeooo:rsid="00abad52"/>
    </style:style>
    <style:style style:name="T53" style:family="text">
      <style:text-properties officeooo:rsid="01073774"/>
    </style:style>
    <style:style style:name="T54" style:family="text">
      <style:text-properties officeooo:rsid="00ff4b86"/>
    </style:style>
    <style:style style:name="T55" style:family="text">
      <style:text-properties fo:font-weight="bold" officeooo:rsid="00ff4b86" style:font-weight-asian="bold" style:font-weight-complex="bold"/>
    </style:style>
    <style:style style:name="T56" style:family="text">
      <style:text-properties officeooo:rsid="0101b438"/>
    </style:style>
    <style:style style:name="T57" style:family="text">
      <style:text-properties officeooo:rsid="00619fac"/>
    </style:style>
    <style:style style:name="T58" style:family="text">
      <style:text-properties fo:font-weight="bold" officeooo:rsid="00619fac" style:font-weight-asian="bold" style:font-weight-complex="bold"/>
    </style:style>
    <style:style style:name="T59" style:family="text">
      <style:text-properties officeooo:rsid="0062cede"/>
    </style:style>
    <style:style style:name="T60" style:family="text">
      <style:text-properties fo:font-weight="bold" officeooo:rsid="007a12bf" style:font-weight-asian="bold" style:font-weight-complex="bold"/>
    </style:style>
    <style:style style:name="T61" style:family="text">
      <style:text-properties officeooo:rsid="00897bbf"/>
    </style:style>
    <style:style style:name="T62" style:family="text">
      <style:text-properties officeooo:rsid="00658b9d"/>
    </style:style>
    <style:style style:name="T63" style:family="text">
      <style:text-properties officeooo:rsid="010cd9ff"/>
    </style:style>
    <style:style style:name="T64" style:family="text">
      <style:text-properties fo:font-weight="bold" officeooo:rsid="00658b9d" style:font-weight-asian="bold" style:font-weight-complex="bold"/>
    </style:style>
    <style:style style:name="T65" style:family="text">
      <style:text-properties officeooo:rsid="00878cdc"/>
    </style:style>
    <style:style style:name="T66" style:family="text">
      <style:text-properties officeooo:rsid="008b6746"/>
    </style:style>
    <style:style style:name="T67" style:family="text">
      <style:text-properties fo:font-weight="bold" officeooo:rsid="00878cdc" style:font-weight-asian="bold" style:font-weight-complex="bold"/>
    </style:style>
    <style:style style:name="T68" style:family="text">
      <style:text-properties officeooo:rsid="007bd504"/>
    </style:style>
    <style:style style:name="T69" style:family="text">
      <style:text-properties officeooo:rsid="00875c3d"/>
    </style:style>
    <style:style style:name="T70" style:family="text">
      <style:text-properties fo:font-weight="bold" officeooo:rsid="00875c3d" style:font-weight-asian="bold" style:font-weight-complex="bold"/>
    </style:style>
    <style:style style:name="T71" style:family="text">
      <style:text-properties officeooo:rsid="008d408e"/>
    </style:style>
    <style:style style:name="T72" style:family="text">
      <style:text-properties fo:font-weight="bold" officeooo:rsid="008d408e" style:font-weight-asian="bold" style:font-weight-complex="bold"/>
    </style:style>
    <style:style style:name="T73" style:family="text">
      <style:text-properties officeooo:rsid="008fd1d8"/>
    </style:style>
    <style:style style:name="T74" style:family="text">
      <style:text-properties officeooo:rsid="00956e15"/>
    </style:style>
    <style:style style:name="T75" style:family="text">
      <style:text-properties officeooo:rsid="00911ea9"/>
    </style:style>
    <style:style style:name="T76" style:family="text">
      <style:text-properties officeooo:rsid="00930cba"/>
    </style:style>
    <style:style style:name="T77" style:family="text">
      <style:text-properties officeooo:rsid="00971868"/>
    </style:style>
    <style:style style:name="T78" style:family="text">
      <style:text-properties fo:font-style="italic" officeooo:rsid="00956e15" style:font-style-asian="italic" style:font-style-complex="italic"/>
    </style:style>
    <style:style style:name="T79" style:family="text">
      <style:text-properties officeooo:rsid="00990aef"/>
    </style:style>
    <style:style style:name="T80" style:family="text">
      <style:text-properties officeooo:rsid="008eb584"/>
    </style:style>
    <style:style style:name="T81" style:family="text">
      <style:text-properties officeooo:rsid="008fbbf0"/>
    </style:style>
    <style:style style:name="T82" style:family="text">
      <style:text-properties officeooo:rsid="003e5735"/>
    </style:style>
    <style:style style:name="T83" style:family="text">
      <style:text-properties officeooo:rsid="004c8aeb"/>
    </style:style>
    <style:style style:name="T84" style:family="text">
      <style:text-properties officeooo:rsid="00450014"/>
    </style:style>
    <style:style style:name="T85" style:family="text">
      <style:text-properties officeooo:rsid="0042ad95"/>
    </style:style>
    <style:style style:name="T86" style:family="text">
      <style:text-properties officeooo:rsid="00437e02"/>
    </style:style>
    <style:style style:name="T87" style:family="text">
      <style:text-properties style:font-name="Arial1" fo:language="de" fo:country="AT" fo:font-style="normal" style:text-underline-style="none" fo:font-weight="bold" officeooo:rsid="0046865f" style:font-style-asian="normal" style:font-weight-asian="bold" style:font-style-complex="normal" style:font-weight-complex="bold" style:script-type="latin"/>
    </style:style>
    <style:style style:name="T88" style:family="text">
      <style:text-properties style:font-name="Arial1" fo:language="de" fo:country="AT" fo:font-style="normal" style:text-underline-style="none" fo:font-weight="normal" officeooo:rsid="0046865f" style:font-style-asian="normal" style:font-weight-asian="normal" style:font-style-complex="normal" style:font-weight-complex="normal" style:script-type="latin"/>
    </style:style>
    <style:style style:name="T89" style:family="text">
      <style:text-properties style:font-name="Arial1" fo:language="de" fo:country="AT" fo:font-style="normal" style:text-underline-style="none" fo:font-weight="normal" officeooo:rsid="0049a9f6" style:font-style-asian="normal" style:font-weight-asian="normal" style:font-style-complex="normal" style:font-weight-complex="normal" style:script-type="latin"/>
    </style:style>
    <style:style style:name="T90" style:family="text">
      <style:text-properties style:font-name="Arial1" fo:language="de" fo:country="AT" fo:font-style="normal" style:text-underline-style="none" fo:font-weight="normal" officeooo:rsid="004ac65d" style:font-style-asian="normal" style:font-weight-asian="normal" style:font-style-complex="normal" style:font-weight-complex="normal" style:script-type="latin"/>
    </style:style>
    <style:style style:name="T91" style:family="text">
      <style:text-properties style:font-name="Arial1" fo:language="de" fo:country="AT" fo:font-style="normal" style:text-underline-style="none" fo:font-weight="bold" officeooo:rsid="004c8b50" style:font-style-asian="normal" style:font-weight-asian="bold" style:font-style-complex="normal" style:font-weight-complex="bold" style:script-type="latin"/>
    </style:style>
    <style:style style:name="T92" style:family="text">
      <style:text-properties style:font-name="Arial1" fo:language="de" fo:country="AT" fo:font-style="normal" style:text-underline-style="none" fo:font-weight="normal" officeooo:rsid="004c8b50" style:font-style-asian="normal" style:font-weight-asian="normal" style:font-style-complex="normal" style:font-weight-complex="normal" style:script-type="latin"/>
    </style:style>
    <style:style style:name="T93" style:family="text">
      <style:text-properties style:font-name="Arial1" fo:language="de" fo:country="AT" fo:font-style="normal" style:text-underline-style="none" fo:font-weight="normal" officeooo:rsid="0056b582" style:font-style-asian="normal" style:font-weight-asian="normal" style:font-style-complex="normal" style:font-weight-complex="normal" style:script-type="latin"/>
    </style:style>
    <style:style style:name="T94" style:family="text">
      <style:text-properties style:font-name="Arial1" fo:language="de" fo:country="AT" fo:font-style="normal" style:text-underline-style="none" fo:font-weight="normal" officeooo:rsid="00552f59" style:font-style-asian="normal" style:font-weight-asian="normal" style:font-style-complex="normal" style:font-weight-complex="normal" style:script-type="latin"/>
    </style:style>
    <style:style style:name="T95" style:family="text">
      <style:text-properties style:font-name="Arial1" fo:language="de" fo:country="AT" fo:font-style="italic" style:text-underline-style="none" fo:font-weight="normal" officeooo:rsid="00552f59" style:font-style-asian="italic" style:font-weight-asian="normal" style:font-style-complex="italic" style:font-weight-complex="normal" style:script-type="latin"/>
    </style:style>
    <style:style style:name="T96" style:family="text">
      <style:text-properties style:font-name="Arial1" fo:language="de" fo:country="AT" fo:font-style="normal" style:text-underline-style="none" fo:font-weight="normal" officeooo:rsid="005ba0c8" style:font-style-asian="normal" style:font-weight-asian="normal" style:font-style-complex="normal" style:font-weight-complex="normal" style:script-type="latin"/>
    </style:style>
    <style:style style:name="T97" style:family="text">
      <style:text-properties style:font-name="Arial1" fo:language="de" fo:country="AT" fo:font-style="normal" style:text-underline-style="none" fo:font-weight="normal" officeooo:rsid="005bc049" style:font-style-asian="normal" style:font-weight-asian="normal" style:font-style-complex="normal" style:font-weight-complex="normal" style:script-type="latin"/>
    </style:style>
    <style:style style:name="T98" style:family="text">
      <style:text-properties style:font-name="Arial1" fo:language="de" fo:country="AT" fo:font-style="normal" style:text-underline-style="none" fo:font-weight="normal" officeooo:rsid="00715b92" style:font-style-asian="normal" style:font-weight-asian="normal" style:font-style-complex="normal" style:font-weight-complex="normal" style:script-type="latin"/>
    </style:style>
    <style:style style:name="T99" style:family="text">
      <style:text-properties style:font-name="Arial1" fo:language="de" fo:country="AT" fo:font-style="normal" style:text-underline-style="none" fo:font-weight="normal" officeooo:rsid="00759a88" style:font-style-asian="normal" style:font-weight-asian="normal" style:font-style-complex="normal" style:font-weight-complex="normal" style:script-type="latin"/>
    </style:style>
    <style:style style:name="T100" style:family="text">
      <style:text-properties style:font-name="Arial1" fo:language="de" fo:country="AT" fo:font-style="normal" style:text-underline-style="none" fo:font-weight="normal" officeooo:rsid="00769a20" style:font-style-asian="normal" style:font-weight-asian="normal" style:font-style-complex="normal" style:font-weight-complex="normal" style:script-type="latin"/>
    </style:style>
    <style:style style:name="T101" style:family="text">
      <style:text-properties style:font-name="Arial1" fo:language="de" fo:country="AT" fo:font-style="normal" style:text-underline-style="none" fo:font-weight="bold" officeooo:rsid="00759a88" style:font-style-asian="normal" style:font-weight-asian="bold" style:font-style-complex="normal" style:font-weight-complex="bold" style:script-type="latin"/>
    </style:style>
    <style:style style:name="T102" style:family="text">
      <style:text-properties style:font-name="Arial1" fo:language="de" fo:country="AT" fo:font-style="normal" style:text-underline-style="none" fo:font-weight="bold" officeooo:rsid="005ba0c8" style:font-style-asian="normal" style:font-weight-asian="bold" style:font-style-complex="normal" style:font-weight-complex="bold" style:script-type="latin"/>
    </style:style>
    <style:style style:name="T103" style:family="text">
      <style:text-properties style:font-name="Arial1" fo:language="de" fo:country="AT" fo:font-style="normal" style:text-underline-style="none" fo:font-weight="normal" officeooo:rsid="007741e6" style:font-style-asian="normal" style:font-weight-asian="normal" style:font-style-complex="normal" style:font-weight-complex="normal" style:script-type="latin"/>
    </style:style>
    <style:style style:name="T104" style:family="text">
      <style:text-properties style:font-name="Arial1" fo:language="de" fo:country="AT" fo:font-style="normal" style:text-underline-style="none" fo:font-weight="bold" officeooo:rsid="007741e6" style:font-style-asian="normal" style:font-weight-asian="bold" style:font-style-complex="normal" style:font-weight-complex="bold" style:script-type="latin"/>
    </style:style>
    <style:style style:name="T105" style:family="text">
      <style:text-properties style:font-name="Arial1" fo:language="de" fo:country="AT" fo:font-style="normal" style:text-underline-style="none" fo:font-weight="normal" officeooo:rsid="009f9fb8" style:font-style-asian="normal" style:font-weight-asian="normal" style:font-style-complex="normal" style:font-weight-complex="normal" style:script-type="latin"/>
    </style:style>
    <style:style style:name="T106" style:family="text">
      <style:text-properties style:font-name="Arial1" fo:language="de" fo:country="AT" fo:font-style="normal" style:text-underline-style="none" fo:font-weight="bold" officeooo:rsid="009f9fb8" style:font-style-asian="normal" style:font-weight-asian="bold" style:font-style-complex="normal" style:font-weight-complex="bold" style:script-type="latin"/>
    </style:style>
    <style:style style:name="T107" style:family="text">
      <style:text-properties style:font-name="Arial1" fo:language="de" fo:country="AT" fo:font-style="normal" style:text-underline-style="none" fo:font-weight="bold" officeooo:rsid="00eb2af6" style:font-style-asian="normal" style:font-weight-asian="bold" style:font-style-complex="normal" style:font-weight-complex="bold" style:script-type="latin"/>
    </style:style>
    <style:style style:name="T108" style:family="text">
      <style:text-properties style:font-name="Arial1" fo:language="de" fo:country="AT" fo:font-style="normal" style:text-underline-style="none" fo:font-weight="normal" officeooo:rsid="00a0065f" style:font-style-asian="normal" style:font-weight-asian="normal" style:font-style-complex="normal" style:font-weight-complex="normal" style:script-type="latin"/>
    </style:style>
    <style:style style:name="T109" style:family="text">
      <style:text-properties style:font-name="Arial1" fo:language="de" fo:country="AT" fo:font-style="normal" style:text-underline-style="none" fo:font-weight="normal" officeooo:rsid="00a01004" style:font-style-asian="normal" style:font-weight-asian="normal" style:font-style-complex="normal" style:font-weight-complex="normal" style:script-type="latin"/>
    </style:style>
    <style:style style:name="T110" style:family="text">
      <style:text-properties style:font-name="Arial1" fo:language="de" fo:country="AT" fo:font-style="normal" style:text-underline-style="none" fo:font-weight="normal" officeooo:rsid="00ef6e64" style:font-style-asian="normal" style:font-weight-asian="normal" style:font-style-complex="normal" style:font-weight-complex="normal" style:script-type="latin"/>
    </style:style>
    <style:style style:name="T111" style:family="text">
      <style:text-properties style:font-name="Arial1" fo:language="de" fo:country="AT" fo:font-style="italic" style:text-underline-style="none" fo:font-weight="normal" officeooo:rsid="00a01004" style:font-style-asian="italic" style:font-weight-asian="normal" style:font-style-complex="italic" style:font-weight-complex="normal" style:script-type="latin"/>
    </style:style>
    <style:style style:name="T112" style:family="text">
      <style:text-properties style:font-name="Arial1" fo:language="de" fo:country="AT" fo:font-style="normal" style:text-underline-style="none" fo:font-weight="normal" officeooo:rsid="00f0ff3c" style:font-style-asian="normal" style:font-weight-asian="normal" style:font-style-complex="normal" style:font-weight-complex="normal" style:script-type="latin"/>
    </style:style>
    <style:style style:name="T113" style:family="text">
      <style:text-properties style:font-name="Arial1" fo:language="de" fo:country="AT" fo:font-style="normal" style:text-underline-style="none" fo:font-weight="normal" officeooo:rsid="00a03d06" style:font-style-asian="normal" style:font-weight-asian="normal" style:font-style-complex="normal" style:font-weight-complex="normal" style:script-type="latin"/>
    </style:style>
    <style:style style:name="T114" style:family="text">
      <style:text-properties style:font-name="Arial1" fo:language="de" fo:country="AT" fo:font-style="normal" style:text-underline-style="none" fo:font-weight="normal" officeooo:rsid="00f27907" style:font-style-asian="normal" style:font-weight-asian="normal" style:font-style-complex="normal" style:font-weight-complex="normal" style:script-type="latin"/>
    </style:style>
    <style:style style:name="T115" style:family="text">
      <style:text-properties style:font-name="Arial1" fo:language="de" fo:country="AT" fo:font-style="normal" style:text-underline-style="none" fo:font-weight="normal" officeooo:rsid="00efe9b2" style:font-style-asian="normal" style:font-weight-asian="normal" style:font-style-complex="normal" style:font-weight-complex="normal" style:script-type="latin"/>
    </style:style>
    <style:style style:name="T116" style:family="text">
      <style:text-properties style:font-name="Arial1" fo:language="de" fo:country="AT" fo:font-style="normal" style:text-underline-style="none" fo:font-weight="normal" officeooo:rsid="00a1e3d4" style:font-style-asian="normal" style:font-weight-asian="normal" style:font-style-complex="normal" style:font-weight-complex="normal" style:script-type="latin"/>
    </style:style>
    <style:style style:name="T117" style:family="text">
      <style:text-properties style:font-name="Arial1" fo:language="de" fo:country="AT" fo:font-style="normal" style:text-underline-style="none" fo:font-weight="normal" officeooo:rsid="00a2a6ce" style:font-style-asian="normal" style:font-weight-asian="normal" style:font-style-complex="normal" style:font-weight-complex="normal" style:script-type="latin"/>
    </style:style>
    <style:style style:name="T118" style:family="text">
      <style:text-properties fo:font-weight="bold" officeooo:rsid="00790bcb" style:font-weight-asian="bold" style:font-weight-complex="bold"/>
    </style:style>
    <style:style style:name="T119" style:family="text">
      <style:text-properties officeooo:rsid="007be6a5"/>
    </style:style>
    <style:style style:name="T120" style:family="text">
      <style:text-properties officeooo:rsid="00a31ab6"/>
    </style:style>
    <style:style style:name="T121" style:family="text">
      <style:text-properties officeooo:rsid="00a47416"/>
    </style:style>
    <style:style style:name="T122" style:family="text">
      <style:text-properties fo:font-weight="bold" officeooo:rsid="00a47416" style:font-weight-asian="bold" style:font-weight-complex="bold"/>
    </style:style>
    <style:style style:name="T123" style:family="text">
      <style:text-properties fo:font-style="italic" officeooo:rsid="00a47416" style:font-style-asian="italic" style:font-style-complex="italic"/>
    </style:style>
    <style:style style:name="T124" style:family="text">
      <style:text-properties fo:font-weight="bold" officeooo:rsid="00998a06" style:font-weight-asian="bold" style:font-weight-complex="bold"/>
    </style:style>
    <style:style style:name="T125" style:family="text">
      <style:text-properties officeooo:rsid="00998a06"/>
    </style:style>
    <style:style style:name="T126" style:family="text">
      <style:text-properties officeooo:rsid="009f9fb8"/>
    </style:style>
    <style:style style:name="T127" style:family="text">
      <style:text-properties officeooo:rsid="00a5b7f3"/>
    </style:style>
    <style:style style:name="T128" style:family="text">
      <style:text-properties officeooo:rsid="0099d631"/>
    </style:style>
    <style:style style:name="T129" style:family="text">
      <style:text-properties fo:font-weight="bold" officeooo:rsid="0099d631" style:font-weight-asian="bold" style:font-weight-complex="bold"/>
    </style:style>
    <style:style style:name="T130" style:family="text">
      <style:text-properties officeooo:rsid="00eb0811"/>
    </style:style>
    <style:style style:name="T131" style:family="text">
      <style:text-properties fo:font-weight="bold" officeooo:rsid="00eb0811" style:font-weight-asian="bold" style:font-weight-complex="bold"/>
    </style:style>
    <style:style style:name="T132" style:family="text">
      <style:text-properties officeooo:rsid="00ec7c45"/>
    </style:style>
    <style:style style:name="T133" style:family="text">
      <style:text-properties fo:font-style="italic" officeooo:rsid="00ec7c45" style:font-style-asian="italic" style:font-style-complex="italic"/>
    </style:style>
    <style:style style:name="T134" style:family="text">
      <style:text-properties officeooo:rsid="00f4a5b6"/>
    </style:style>
    <style:style style:name="T135" style:family="text">
      <style:text-properties fo:font-weight="bold" officeooo:rsid="00a31ab6" style:font-weight-asian="bold" style:font-weight-complex="bold"/>
    </style:style>
    <style:style style:name="T136" style:family="text">
      <style:text-properties officeooo:rsid="0102dc97"/>
    </style:style>
    <style:style style:name="T137" style:family="text">
      <style:text-properties officeooo:rsid="009d18e8"/>
    </style:style>
    <style:style style:name="T138" style:family="text">
      <style:text-properties officeooo:rsid="00a82934"/>
    </style:style>
    <style:style style:name="T139" style:family="text">
      <style:text-properties fo:font-weight="bold" officeooo:rsid="00b35725" style:font-weight-asian="bold" style:font-weight-complex="bold"/>
    </style:style>
    <style:style style:name="T140" style:family="text">
      <style:text-properties fo:font-weight="bold" officeooo:rsid="00b62c2f" style:font-weight-asian="bold" style:font-weight-complex="bold"/>
    </style:style>
    <style:style style:name="T141" style:family="text">
      <style:text-properties officeooo:rsid="00b35725"/>
    </style:style>
    <style:style style:name="T142" style:family="text">
      <style:text-properties officeooo:rsid="00b899e2"/>
    </style:style>
    <style:style style:name="T143" style:family="text">
      <style:text-properties fo:font-weight="bold" officeooo:rsid="00b9614c" style:font-weight-asian="bold" style:font-weight-complex="bold"/>
    </style:style>
    <style:style style:name="T144" style:family="text">
      <style:text-properties fo:font-weight="bold" officeooo:rsid="00b899e2" style:font-weight-asian="bold" style:font-weight-complex="bold"/>
    </style:style>
    <style:style style:name="T145" style:family="text">
      <style:text-properties officeooo:rsid="00b9614c"/>
    </style:style>
    <style:style style:name="T146" style:family="text">
      <style:text-properties officeooo:rsid="00bc1460"/>
    </style:style>
    <style:style style:name="T147" style:family="text">
      <style:text-properties fo:font-style="italic" officeooo:rsid="00bc1460" style:font-style-asian="italic" style:font-style-complex="italic"/>
    </style:style>
    <style:style style:name="T148" style:family="text">
      <style:text-properties fo:font-weight="bold" officeooo:rsid="00bdd023" style:font-weight-asian="bold" style:font-weight-complex="bold"/>
    </style:style>
    <style:style style:name="T149" style:family="text">
      <style:text-properties officeooo:rsid="00bdd023"/>
    </style:style>
    <style:style style:name="T150" style:family="text">
      <style:text-properties officeooo:rsid="00bfa268"/>
    </style:style>
    <style:style style:name="T151" style:family="text">
      <style:text-properties fo:font-weight="bold" officeooo:rsid="00bfa268" style:font-weight-asian="bold" style:font-weight-complex="bold"/>
    </style:style>
    <style:style style:name="T152" style:family="text">
      <style:text-properties officeooo:rsid="00c0b542"/>
    </style:style>
    <style:style style:name="T153" style:family="text">
      <style:text-properties fo:font-weight="bold" officeooo:rsid="00c0b542" style:font-weight-asian="bold" style:font-weight-complex="bold"/>
    </style:style>
    <style:style style:name="T154" style:family="text">
      <style:text-properties officeooo:rsid="00c30ade"/>
    </style:style>
    <style:style style:name="T155" style:family="text">
      <style:text-properties officeooo:rsid="00c21feb"/>
    </style:style>
    <style:style style:name="T156" style:family="text">
      <style:text-properties fo:font-style="italic" officeooo:rsid="00c30ade" style:font-style-asian="italic" style:font-style-complex="italic"/>
    </style:style>
    <style:style style:name="T157" style:family="text">
      <style:text-properties officeooo:rsid="00c49581"/>
    </style:style>
    <style:style style:name="T158" style:family="text">
      <style:text-properties fo:font-weight="bold" officeooo:rsid="004f4dab" style:font-weight-asian="bold" style:font-weight-complex="bold"/>
    </style:style>
    <style:style style:name="T159" style:family="text">
      <style:text-properties officeooo:rsid="004f4dab"/>
    </style:style>
    <style:style style:name="T160" style:family="text">
      <style:text-properties fo:font-weight="bold" officeooo:rsid="00581aba" style:font-weight-asian="bold" style:font-weight-complex="bold"/>
    </style:style>
    <style:style style:name="T161" style:family="text">
      <style:text-properties fo:font-weight="bold" officeooo:rsid="0059fcd8" style:font-weight-asian="bold" style:font-weight-complex="bold"/>
    </style:style>
    <style:style style:name="T162" style:family="text">
      <style:text-properties officeooo:rsid="00581aba"/>
    </style:style>
    <style:style style:name="T163" style:family="text">
      <style:text-properties officeooo:rsid="00829814"/>
    </style:style>
    <style:style style:name="T164" style:family="text">
      <style:text-properties officeooo:rsid="00822bc3"/>
    </style:style>
    <style:style style:name="T165" style:family="text">
      <style:text-properties fo:font-weight="bold" officeooo:rsid="00822bc3" style:font-weight-asian="bold" style:font-weight-complex="bold"/>
    </style:style>
    <style:style style:name="T166" style:family="text">
      <style:text-properties officeooo:rsid="00cd425b"/>
    </style:style>
    <style:style style:name="T167" style:family="text">
      <style:text-properties officeooo:rsid="00ccc38f"/>
    </style:style>
    <style:style style:name="T168" style:family="text">
      <style:text-properties fo:font-weight="normal" officeooo:rsid="00c9dbd5" style:font-weight-asian="normal" style:font-weight-complex="normal"/>
    </style:style>
    <style:style style:name="T169" style:family="text">
      <style:text-properties fo:font-weight="normal" officeooo:rsid="00cb61c9" style:font-weight-asian="normal" style:font-weight-complex="normal"/>
    </style:style>
    <style:style style:name="T170" style:family="text">
      <style:text-properties fo:font-weight="normal" officeooo:rsid="0034a796" style:font-weight-asian="normal" style:font-weight-complex="normal"/>
    </style:style>
    <style:style style:name="T171" style:family="text">
      <style:text-properties fo:font-weight="normal" officeooo:rsid="00cbafc4" style:font-weight-asian="normal" style:font-weight-complex="normal"/>
    </style:style>
    <style:style style:name="T172" style:family="text">
      <style:text-properties fo:font-weight="normal" officeooo:rsid="00cf90ff" style:font-weight-asian="normal" style:font-weight-complex="normal"/>
    </style:style>
    <style:style style:name="T173" style:family="text">
      <style:text-properties fo:font-weight="normal" officeooo:rsid="00ce4f54" style:font-weight-asian="normal" style:font-weight-complex="normal"/>
    </style:style>
    <style:style style:name="T174" style:family="text">
      <style:text-properties fo:font-weight="normal" officeooo:rsid="00d0b6b3" style:font-weight-asian="normal" style:font-weight-complex="normal"/>
    </style:style>
    <style:style style:name="T175" style:family="text">
      <style:text-properties fo:font-weight="normal" officeooo:rsid="00d1e79a" style:font-weight-asian="normal" style:font-weight-complex="normal"/>
    </style:style>
    <style:style style:name="T176" style:family="text">
      <style:text-properties fo:font-weight="normal" officeooo:rsid="00d4c39e" style:font-weight-asian="normal" style:font-weight-complex="normal"/>
    </style:style>
    <style:style style:name="T177" style:family="text">
      <style:text-properties fo:font-weight="normal" officeooo:rsid="00de08e1" style:font-weight-asian="normal" style:font-weight-complex="normal"/>
    </style:style>
    <style:style style:name="T178" style:family="text">
      <style:text-properties fo:font-weight="normal" officeooo:rsid="00e5e0a1" style:font-weight-asian="normal" style:font-weight-complex="normal"/>
    </style:style>
    <style:style style:name="T179" style:family="text">
      <style:text-properties fo:font-weight="normal" officeooo:rsid="00de5bbc" style:font-weight-asian="normal" style:font-weight-complex="normal"/>
    </style:style>
    <style:style style:name="T180" style:family="text">
      <style:text-properties fo:font-weight="normal" officeooo:rsid="00dfe092" style:font-weight-asian="normal" style:font-weight-complex="normal"/>
    </style:style>
    <style:style style:name="T181" style:family="text">
      <style:text-properties fo:font-weight="normal" officeooo:rsid="00e01a32" style:font-weight-asian="normal" style:font-weight-complex="normal"/>
    </style:style>
    <style:style style:name="T182" style:family="text">
      <style:text-properties fo:font-weight="normal" officeooo:rsid="00e08f78" style:font-weight-asian="normal" style:font-weight-complex="normal"/>
    </style:style>
    <style:style style:name="T183" style:family="text">
      <style:text-properties fo:font-weight="normal" officeooo:rsid="00e0c83f" style:font-weight-asian="normal" style:font-weight-complex="normal"/>
    </style:style>
    <style:style style:name="T184" style:family="text">
      <style:text-properties fo:font-weight="normal" officeooo:rsid="00e3eaf0" style:font-weight-asian="normal" style:font-weight-complex="normal"/>
    </style:style>
    <style:style style:name="T185" style:family="text">
      <style:text-properties fo:font-weight="normal" officeooo:rsid="00e2f1f7" style:font-weight-asian="normal" style:font-weight-complex="normal"/>
    </style:style>
    <style:style style:name="T186" style:family="text">
      <style:text-properties fo:font-weight="normal" officeooo:rsid="00e79dce" style:font-weight-asian="normal" style:font-weight-complex="normal"/>
    </style:style>
    <style:style style:name="T187" style:family="text">
      <style:text-properties fo:font-weight="normal" officeooo:rsid="00e7a3f2" style:font-weight-asian="normal" style:font-weight-complex="normal"/>
    </style:style>
    <style:style style:name="T188" style:family="text">
      <style:text-properties fo:font-weight="normal" officeooo:rsid="00e83d9d" style:font-weight-asian="normal" style:font-weight-complex="normal"/>
    </style:style>
    <style:style style:name="T189" style:family="text">
      <style:text-properties fo:font-style="italic" fo:font-weight="normal" officeooo:rsid="00e83d9d" style:font-style-asian="italic" style:font-weight-asian="normal" style:font-style-complex="italic" style:font-weight-complex="normal"/>
    </style:style>
    <style:style style:name="T190" style:family="text">
      <style:text-properties fo:font-weight="normal" officeooo:rsid="00e8f7c6" style:font-weight-asian="normal" style:font-weight-complex="normal"/>
    </style:style>
    <style:style style:name="T191" style:family="text">
      <style:text-properties officeooo:rsid="00f5d0a8"/>
    </style:style>
    <style:style style:name="T192" style:family="text">
      <style:text-properties officeooo:rsid="00f65ab1"/>
    </style:style>
    <style:style style:name="T193" style:family="text">
      <style:text-properties officeooo:rsid="00f89283"/>
    </style:style>
    <style:style style:name="T194" style:family="text">
      <style:text-properties officeooo:rsid="00f9e8f4"/>
    </style:style>
    <style:style style:name="T195" style:family="text">
      <style:text-properties officeooo:rsid="00f6b211"/>
    </style:style>
    <style:style style:name="T196" style:family="text">
      <style:text-properties fo:font-weight="normal" officeooo:rsid="00d6dbb6" style:font-weight-asian="normal" style:font-weight-complex="normal"/>
    </style:style>
    <style:style style:name="T197" style:family="text">
      <style:text-properties fo:font-style="italic" fo:font-weight="normal" officeooo:rsid="00d6dbb6" style:font-style-asian="italic" style:font-weight-asian="normal" style:font-style-complex="italic" style:font-weight-complex="normal"/>
    </style:style>
    <style:style style:name="T198" style:family="text">
      <style:text-properties fo:font-weight="normal" officeooo:rsid="00da40a2" style:font-weight-asian="normal" style:font-weight-complex="normal"/>
    </style:style>
    <style:style style:name="T199" style:family="text">
      <style:text-properties fo:font-weight="normal" officeooo:rsid="00daf245" style:font-weight-asian="normal" style:font-weight-complex="normal"/>
    </style:style>
    <style:style style:name="T200" style:family="text">
      <style:text-properties fo:font-style="italic" fo:font-weight="normal" officeooo:rsid="00daf245" style:font-style-asian="italic" style:font-weight-asian="normal" style:font-style-complex="italic" style:font-weight-complex="normal"/>
    </style:style>
    <style:style style:name="T201" style:family="text">
      <style:text-properties officeooo:rsid="00afb0e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ÄDN Schizo-Variante</text:p>
      <text:p text:style-name="P2">Spielanleitung</text:p>
      <text:p text:style-name="P3"/>
      <text:p text:style-name="P4"><text:span text:style-name="T1">#1</text:span> Allgemeines</text:p>
      <text:p text:style-name="P5"/>
      <text:p text:style-name="P6"><text:span text:style-name="T2">Das Ziel des Spiels ist es, </text:span><text:span text:style-name="T3">in so wenig Zügen wie möglich </text:span><text:span text:style-name="T4">alle</text:span><text:span text:style-name="T5"> Figuren (anfangs auf den Feldern markiert mit A, B, C, D) der eigenen Farbe </text:span><text:span text:style-name="T6">mittels Würfeln und strategischen Bewegen </text:span><text:span text:style-name="T5">in die Endfelder (</text:span><text:span text:style-name="T7">markiert mit </text:span><text:span text:style-name="T5">a, b, c, d) der eigenen Farbe zu bringen. </text:span><text:span text:style-name="T8"><text:line-break/></text:span></text:p>
      <text:p text:style-name="P7"><text:span text:style-name="T9">Vorbereitung</text:span><text:span text:style-name="T10">: </text:span>Das Spiel kann von 2-4 Spielern gespielt werden. <text:span text:style-name="T11">Hierbei dürfen sich Spieler nach der Reihe die Farbe aussuchen. Wenn zuvor ein Spiel gespielt wurde, ist die Reihenfolge die Inverse der Gewinn</text:span><text:span text:style-name="T12">reihenfolge, ansonsten soll </text:span><text:span text:style-name="T13">diese </text:span><text:span text:style-name="T12">ausgelost werden. </text:span><text:span text:style-name="T14">Bei zwei Spielern muss der zweite Spieler der Reihenfolge die Farbe, die gegenüber der des ersten Spielers liegt, auswählen. <text:line-break/></text:span><text:span text:style-name="T15">Es sollen keine Objekte im Spielfeld sein, und alle Figuren aktiver Spieler sollen in den </text:span><text:span text:style-name="T16">Heimfeldern</text:span><text:span text:style-name="T15">, </text:span><text:span text:style-name="T17">markiert mit A, B, C, D, </text:span><text:span text:style-name="T15">der jeweiligen Farbe platziert werden.</text:span></text:p>
      <text:p text:style-name="P7"/>
      <text:p text:style-name="P8"><text:span text:style-name="T18">Spielstart</text:span><text:span text:style-name="T19">: </text:span><text:span text:style-name="T20">Der Spieler, der das letzte Spiel gewonnen hat, </text:span><text:span text:style-name="T21">oder</text:span><text:span text:style-name="T20"> ein ausgeloster Spieler darf anfangen. </text:span><text:span text:style-name="T22">Anfangs wird gegen den Uhrzeigersinn gespielt. Am Spielstart darf jeder Spieler aufgrund der </text:span><text:span text:style-name="T23">Alles-Inaktiv</text:span><text:span text:style-name="T24">-Regel</text:span><text:span text:style-name="T22"> </text:span><text:span text:style-name="T25">maximal </text:span><text:span text:style-name="T22">drei </text:span><text:span text:style-name="T26">mal würfeln, </text:span><text:span text:style-name="T25">oder</text:span><text:span text:style-name="T26"> </text:span><text:span text:style-name="T27">bis </text:span><text:span text:style-name="T28">eine Sechs (</text:span><text:span text:style-name="T27">⚅</text:span><text:span text:style-name="T28">)</text:span><text:span text:style-name="T27"> gewürfelt </text:span><text:span text:style-name="T25">wurde</text:span><text:span text:style-name="T27">. </text:span><text:span text:style-name="T29">Falls das geschehen ist, </text:span><text:span text:style-name="T30">muss</text:span><text:span text:style-name="T29"> aufgrund der </text:span><text:span text:style-name="T31">Sechser-Regel</text:span><text:span text:style-name="T32"> </text:span><text:span text:style-name="T29">eine beliebige Figur der eigenen Farbe in den Spielstart, markiert als ein Quadrat der eigenen Farbe, geben, </text:span><text:span text:style-name="T33">und es darf auch noch einmal gewürfelt werden.</text:span></text:p>
      <text:p text:style-name="P9"/>
      <text:p text:style-name="P10">Spielverlauf<text:span text:style-name="T34">: Das Spiel wird so lange gespielt, bis alle Spieler </text:span><text:span text:style-name="T35">alle</text:span><text:span text:style-name="T34"> Figuren </text:span><text:span text:style-name="T35">ihrer Farbe </text:span><text:span text:style-name="T34">in den jeweiligen Endfeldern, markiert mit a, b, c, d, bekommen hat. </text:span><text:span text:style-name="T36">Der erste Spieler, der </text:span><text:span text:style-name="T37">dies</text:span><text:span text:style-name="T36"> schafft, </text:span><text:span text:style-name="T37">hat gewonnen</text:span><text:span text:style-name="T36">.</text:span></text:p>
      <text:p text:style-name="P11"/>
      <text:p text:style-name="P11">Es wird zwischen <text:span text:style-name="T38">Figuren</text:span>, welche vom Spieler der jeweiligen Farbe spielbar sind, und platzierbaren <text:span text:style-name="T38">Objekten</text:span> unterschieden.</text:p>
      <text:p text:style-name="P11"/>
      <text:p text:style-name="P12">Als <text:span text:style-name="T38">kontrollierender Spieler</text:span> gilt derjenige Spieler, der gerade am Zug ist, auch wenn es nicht <text:span text:style-name="T39">Figuren </text:span><text:span text:style-name="T40">seiner Farbe sind</text:span><text:span text:style-name="T39">, die </text:span><text:span text:style-name="T41">er in Ausnahme</text:span><text:span text:style-name="T42">fällen</text:span><text:span text:style-name="T41"> </text:span><text:span text:style-name="T39">aber </text:span><text:span text:style-name="T41">bewegen mag.</text:span></text:p>
      <text:p text:style-name="P13"/>
      <text:p text:style-name="P14">Sofern keine andere Regel in Kraft tritt, darf <text:span text:style-name="T43">der </text:span><text:span text:style-name="T44">kontrollierende Spieler</text:span><text:span text:style-name="T43"> pro Zug </text:span><text:span text:style-name="T45">einmal würfeln</text:span><text:span text:style-name="T43"> und eine beliebige </text:span><text:span text:style-name="T46">aktive </text:span><text:span text:style-name="T47">Figur seiner Farbe in der vorgegebenen Richtung bewegen.</text:span></text:p>
      <text:p text:style-name="P14"/>
      <text:p text:style-name="P14"><text:span text:style-name="T48">Der Spieler muss </text:span><text:span text:style-name="T49">eine Figur</text:span><text:span text:style-name="T48">, sofern keine andere Regel in Kraft tritt, auf </text:span><text:span text:style-name="T50">das</text:span><text:span text:style-name="T48"> Feld, das um die </text:span><text:span text:style-name="T51">genaue Würfelzahl</text:span><text:span text:style-name="T48"> </text:span><text:span text:style-name="T52">an </text:span><text:span text:style-name="T53">direkt angrenzenden </text:span><text:span text:style-name="T52">Feldern </text:span><text:span text:style-name="T53">in der vorgegebenen Richtung </text:span><text:span text:style-name="T52">nach dieser liegt</text:span><text:span text:style-name="T48">, bewegen.</text:span></text:p>
      <text:p text:style-name="P15"/>
      <text:p text:style-name="P16"><text:span text:style-name="T54">Die </text:span><text:span text:style-name="T55">vorgegebene Richtung </text:span><text:span text:style-name="T54">ist diejenige, die entweder durch Pfeilsymbolen auf Feldern gekennzeichnet ist, oder </text:span><text:span text:style-name="T56">bei den Feldern, bei denen</text:span><text:span text:style-name="T54"> das nicht der Fall ist, das nächste Feld, das entweder auch ein Pfeilsymbol beinhaltet, oder das „a“-Endfeld ist. </text:span><text:span text:style-name="T57">Bei </text:span><text:span text:style-name="T58">Verzweigungen</text:span><text:span text:style-name="T57"> darf sich der kontrollierende Spieler aussuchen, </text:span><text:span text:style-name="T59">welchen Weg er nehmen möchte. </text:span></text:p>
      <text:p text:style-name="P17"/>
      <text:p text:style-name="P18">Eine Figur gilt als <text:span text:style-name="T60">a</text:span><text:span text:style-name="T38">ktiv</text:span>, wenn <text:span text:style-name="T61">sich </text:span>diese weder in einem <text:span text:style-name="T38">Heimfeld </text:span>noch i<text:span text:style-name="T62">m </text:span><text:span text:style-name="T63">von ihr aus</text:span><text:span text:style-name="T62"> </text:span><text:span text:style-name="T64">letztmöglichen Endfeld </text:span>liegt.</text:p>
      <text:p text:style-name="P18"/>
      <text:p text:style-name="P19"><text:soft-page-break/><text:span text:style-name="T65">Wenn eine Figur auf einer anderen, egal ob es sich dabei um einer anderen oder derselben Farbe handelt, landet, </text:span><text:span text:style-name="T66">und diese nicht als geschützt gilt</text:span><text:span text:style-name="T65">, gilt die Figur, auf der gelandet wurde, als </text:span><text:span text:style-name="T67">geschmissen</text:span><text:span text:style-name="T65">. </text:span>Wenn eine Figur von einer anderen Figur, einem Event oder <text:span text:style-name="T68">ähnlichem</text:span><text:span text:style-name="T38"> </text:span>geschmissen wird, muss diese Zurück in ein freies <text:span text:style-name="T38">Heimfeld</text:span> der jeweiligen Farbe. </text:p>
      <text:p text:style-name="P18"/>
      <text:p text:style-name="P13">Eine Figur gilt als <text:span text:style-name="T38">geschützt</text:span>, <text:span text:style-name="T69">wenn sie auf einem </text:span><text:span text:style-name="T70">Heimfeld</text:span><text:span text:style-name="T69">, </text:span><text:span text:style-name="T70">Endfeld</text:span><text:span text:style-name="T69"> oder </text:span><text:span text:style-name="T70">Schild</text:span><text:span text:style-name="T69"> liegt, was bedeutet, dass </text:span><text:span text:style-name="T71">diese </text:span><text:span text:style-name="T72">nicht geschmissen</text:span><text:span text:style-name="T71"> werden darf. Sollte, wie im Beispiel eines Schildes </text:span><text:span text:style-name="T73">durchaus möglich</text:span><text:span text:style-name="T71">, eine </text:span><text:span text:style-name="T74">aktiv </text:span><text:span text:style-name="T71">Figur </text:span><text:span text:style-name="T75">sich </text:span><text:span text:style-name="T71">trotzdem dort befinden, wird die Figur, die gerade versucht hat, darauf zu landen, </text:span><text:span text:style-name="T76">in Stelle </text:span><text:span text:style-name="T71">der geschützten Fig</text:span><text:span text:style-name="T74">ur</text:span><text:span text:style-name="T71"> geschmissen. </text:span><text:span text:style-name="T74">Wenn diese geschützte Figur sich </text:span><text:span text:style-name="T77">jedoch </text:span><text:span text:style-name="T74">im letztmöglichen Endfeld befindet, tritt stattdessen die </text:span><text:span text:style-name="T78">Spring-Zurück-Regel</text:span><text:span text:style-name="T74"> in </text:span><text:span text:style-name="T79">K</text:span><text:span text:style-name="T74">raft</text:span><text:span text:style-name="T71">. </text:span><text:span text:style-name="T80">Es darf </text:span><text:span text:style-name="T81">sich </text:span><text:span text:style-name="T80">also niemals mehr als eine Figur gleichzeitig auf einem Feld </text:span><text:span text:style-name="T81">befinden.</text:span></text:p>
      <text:p text:style-name="P9"/>
      <text:p text:style-name="P20"><text:span text:style-name="T1">#2</text:span> <text:span text:style-name="T82">Felder</text:span></text:p>
      <text:p text:style-name="P21"/>
      <text:p text:style-name="P22">Mit Ausnahme der Endfelder <text:span text:style-name="T83">und Heimfelder </text:span>gelten alle Felder als betretbar <text:span text:style-name="T84">und haben eine Richtung, die gegen Ende geht</text:span>. <text:span text:style-name="T85">Es gibt folgende verschiedene Felder</text:span><text:span text:style-name="T86">typen:</text:span></text:p>
      <text:p text:style-name="P22"><draw:frame draw:style-name="fr1" draw:name="Image1" text:anchor-type="char" svg:x="0.42cm" svg:y="0.402cm" svg:width="0.624cm" svg:height="0.624cm" draw:z-index="0"><draw:image xlink:href="Pictures/1000000100000026000000262A52589D.png" xlink:type="simple" xlink:show="embed" xlink:actuate="onLoad" draw:mime-type="image/png"/></draw:frame></text:p>
      <text:list text:style-name="L1">
        <text:list-header>
          <text:p text:style-name="P23"><text:span text:style-name="T87">Standartfeld</text:span><text:span text:style-name="T88">: </text:span><text:span text:style-name="T89">Ein normales Feld ohne besondere Eigenschaften. </text:span><text:span text:style-name="T90">Der in der Mitte liegende Pfeil zeigt die Richtung an.</text:span></text:p>
        </text:list-header>
      </text:list>
      <text:p text:style-name="P24"><draw:frame draw:style-name="fr1" draw:name="Image2" text:anchor-type="char" svg:x="0.42cm" svg:y="0.406cm" svg:width="0.624cm" svg:height="0.624cm" draw:z-index="1"><draw:image xlink:href="Pictures/1000000100000026000000262F237FEA.png" xlink:type="simple" xlink:show="embed" xlink:actuate="onLoad" draw:mime-type="image/png"/></draw:frame></text:p>
      <text:list text:continue-numbering="true" text:style-name="L1">
        <text:list-header>
          <text:p text:style-name="P25"><text:span text:style-name="T91">Startfeld</text:span><text:span text:style-name="T92">: </text:span><text:span text:style-name="T93">Wenn aufgrund der</text:span><text:span text:style-name="T94"> </text:span><text:span text:style-name="T95">Sechser-Regel</text:span><text:span text:style-name="T94"> </text:span><text:span text:style-name="T93">eine Figur ins Spiel gebracht wird, </text:span><text:span text:style-name="T96">muss diese Figur auf das Startfeld der jeweiligen Farbe </text:span><text:span text:style-name="T97">platziert werden</text:span><text:span text:style-name="T96">. </text:span><text:span text:style-name="T98">Wenn dabei schon eine Figur, </text:span><text:span text:style-name="T99">egal ob diese der eigenen Farbe oder nicht entspricht, wird diese </text:span><text:span text:style-name="T100">zuvor</text:span><text:span text:style-name="T101"> geschmissen</text:span><text:span text:style-name="T99">.</text:span><text:span text:style-name="T102"> </text:span><text:span text:style-name="T96">Hier zeigt der Pfeil die zwei nachfolgenden Felder an, wobei </text:span><text:span text:style-name="T97">sich der kontrollierende Spieler die Richtung aussuchen darf. <text:line-break/></text:span><text:span text:style-name="T103">Ein Startfeld gilt als </text:span><text:span text:style-name="T104">inaktiv</text:span><text:span text:style-name="T103">, wenn kein Spieler dieser Farbe im Spiel ist, was bedeutet, dass diese Feld de-facto äquivalent zu einem Standartfeld mit Verzweigung ist. </text:span><text:span text:style-name="T105">Dieses Feld gilt als </text:span><text:span text:style-name="T106">verkehrte</text:span><text:span text:style-name="T107">s</text:span><text:span text:style-name="T106"> Barriere</text:span><text:span text:style-name="T107">nfeld</text:span><text:span text:style-name="T105">, d.h. wenn ein</text:span><text:span text:style-name="T108">e Figur sich ausnahmsweise rückwärts bewegt, </text:span><text:span text:style-name="T109">tritt </text:span><text:span text:style-name="T110">bei Überschießung</text:span><text:span text:style-name="T109"> anstatt Passierung die </text:span><text:span text:style-name="T111">Spring-Zurück-Regel</text:span><text:span text:style-name="T109"> in Kraft. </text:span><text:span text:style-name="T112">Vorwärts </text:span><text:span text:style-name="T113">darf </text:span><text:span text:style-name="T114">dieses Feld </text:span><text:span text:style-name="T113">jedoch </text:span><text:span text:style-name="T115">durchaus</text:span><text:span text:style-name="T116"> </text:span><text:span text:style-name="T113">anstatt </text:span><text:span text:style-name="T117">zu </text:span><text:span text:style-name="T113">einem Endfeld </text:span><text:span text:style-name="T117">zu gelangen </text:span><text:span text:style-name="T113">passiert werden. </text:span></text:p>
        </text:list-header>
      </text:list>
      <text:p text:style-name="P26"><draw:frame draw:style-name="fr2" draw:name="Image3 Copy 1" text:anchor-type="char" svg:x="0.418cm" svg:y="0.455cm" svg:width="0.54cm" svg:height="0.61cm" draw:z-index="2"><draw:image xlink:href="Pictures/10000001000000260000002BD499F344.png" xlink:type="simple" xlink:show="embed" xlink:actuate="onLoad" draw:mime-type="image/png"/></draw:frame></text:p>
      <text:list text:continue-numbering="true" text:style-name="L1">
        <text:list-header>
          <text:p text:style-name="P27"><text:span text:style-name="T118">Heimfeld</text:span><text:span text:style-name="T46">: </text:span><text:span text:style-name="T119">Jede Figur ist zu Beginn des Spiels auf einem Heimfeld. </text:span><text:span text:style-name="T120">Eine </text:span><text:span text:style-name="T121">Figur auf diesem Feld gilt als </text:span><text:span text:style-name="T122">inaktiv</text:span><text:span text:style-name="T121">, bis sie mittels </text:span><text:span text:style-name="T123">Sechser-Regel </text:span><text:span text:style-name="T121">oder einem Event ins Startfeld der eigenen Farbe gebracht wird.</text:span></text:p>
          <text:p text:style-name="P27"><text:line-break/><draw:frame draw:style-name="fr2" draw:name="Image4" text:anchor-type="char" svg:x="0.45cm" svg:y="0.482cm" svg:width="0.437cm" svg:height="0.58cm" draw:z-index="3"><draw:image xlink:href="Pictures/1000000100000059000000764CA302DC.png" xlink:type="simple" xlink:show="embed" xlink:actuate="onLoad" draw:mime-type="image/png"/></draw:frame><text:span text:style-name="T124">Endfeld</text:span><text:span text:style-name="T125">: </text:span><text:span text:style-name="T126">Diese Felder dürfen </text:span><text:span text:style-name="T127">nur von Figuren der selben Farbe betreten werden</text:span><text:span text:style-name="T125">. </text:span><text:span text:style-name="T128">Als </text:span><text:span text:style-name="T129">letztmögliches </text:span><text:span text:style-name="T128">Endfeld gilt das letzte Endfeld der jeweiligen Farbe auf dem sich keine andere Figur bereits befindet. </text:span><text:span text:style-name="T130">Das letztmögliche Endfeld gilt als </text:span><text:span text:style-name="T131">Barrierenfeld</text:span><text:span text:style-name="T130">, </text:span><text:span text:style-name="T132">was bedeutet, dass hier bei Überschießung die </text:span><text:span text:style-name="T133">Spring-Zurück-Regel</text:span><text:span text:style-name="T132"> in Kraft </text:span><text:span text:style-name="T134">tritt</text:span><text:span text:style-name="T128">. </text:span><text:span text:style-name="T120">Figuren in von ihnen aus letztmöglichen Endfeld gelten als </text:span><text:span text:style-name="T135">inaktiv</text:span><text:span text:style-name="T120">.</text:span><text:span text:style-name="T128"> </text:span><text:span text:style-name="T136">Die Reihenfolge der Endfeldern ist a → b → c → d. </text:span><text:span text:style-name="T137">Das Ziel des Spiel ist es, als erste</text:span><text:span text:style-name="T138">r Spieler</text:span><text:span text:style-name="T137"> alle Endfelder zu befüllen.</text:span></text:p>
          <text:p text:style-name="P27"><draw:frame draw:style-name="fr2" draw:name="Image5 Copy 1" text:anchor-type="char" svg:x="0.455cm" svg:y="0.457cm" svg:width="0.572cm" svg:height="0.543cm" draw:z-index="4"><draw:image xlink:href="Pictures/100000010000006B000000660136E7C4.png" xlink:type="simple" xlink:show="embed" xlink:actuate="onLoad" draw:mime-type="image/png"/></draw:frame><text:line-break/><text:span text:style-name="T139">Eigenevent</text:span><text:span text:style-name="T140">f</text:span><text:span text:style-name="T139">eld</text:span><text:span text:style-name="T141">: </text:span><text:span text:style-name="T142">Wenn eine Figur auf diesem Feld landet, wird ein </text:span><text:span text:style-name="T143">f</text:span><text:span text:style-name="T144">igurenspezifisches Event</text:span><text:span text:style-name="T142"> ausgelöst. </text:span><text:span text:style-name="T145">Hierbei entscheidet ein </text:span><text:span text:style-name="T143">besonderer Würfelwurf</text:span><text:span text:style-name="T145"> um welches Event es sich </text:span><text:span text:style-name="T1">für diese Figur alleine handelt. </text:span><text:span text:style-name="T146">Genaueres dazu gibt es in </text:span><text:span text:style-name="T147">#6 Events</text:span><text:span text:style-name="T146"> zu finden. </text:span></text:p>
          <text:p text:style-name="P27"><draw:frame draw:style-name="fr2" draw:name="Image6" text:anchor-type="char" svg:x="0.455cm" svg:y="0.439cm" svg:width="0.58cm" svg:height="0.554cm" draw:z-index="5"><draw:image xlink:href="Pictures/100000010000006600000066F596B132.png" xlink:type="simple" xlink:show="embed" xlink:actuate="onLoad" draw:mime-type="image/png"/></draw:frame><text:line-break/><text:span text:style-name="T148">Globaleventfeld</text:span><text:span text:style-name="T149">: </text:span><text:span text:style-name="T150">Wenn eine Figur auf diesem Feld landet, wird ein </text:span><text:span text:style-name="T151">globales Event</text:span><text:span text:style-name="T150"> </text:span><text:soft-page-break/><text:span text:style-name="T150">ausgelöst. </text:span><text:span text:style-name="T152">Hierbei entscheidet ein </text:span><text:span text:style-name="T153">besonderer Würfelwurf</text:span><text:span text:style-name="T152"> um welches Event es sich hierbei handelt. </text:span><text:span text:style-name="T154">Spezifische </text:span><text:span text:style-name="T155">Entscheidungen werden vom kontrollierenden Spieler gemacht. </text:span><text:span text:style-name="T154">Genaueres dazu gibt es in </text:span><text:span text:style-name="T156">#6 Events</text:span><text:span text:style-name="T154"> zu finden.</text:span></text:p>
        </text:list-header>
      </text:list>
      <text:p text:style-name="P22"/>
      <text:p text:style-name="P28"><text:span text:style-name="T157">Alle </text:span>Feld<text:span text:style-name="T157">er</text:span> außer <text:span text:style-name="T38">Standartfelder </text:span>und <text:span text:style-name="T158">inaktive Startfelder </text:span><text:span text:style-name="T157">gelten </text:span><text:span text:style-name="T159">unter </text:span><text:span text:style-name="T160">Platzier</text:span><text:span text:style-name="T161">verbot</text:span><text:span text:style-name="T162">, was bedeutet, dass keine Objekte darauf platziert werden dürfen.</text:span></text:p>
      <text:p text:style-name="P29"/>
      <text:p text:style-name="P30">Figuren auf <text:span text:style-name="T38">Heimfeldern </text:span><text:span text:style-name="T163">oder</text:span> <text:span text:style-name="T38">Endfeldern</text:span>, auch wenn es sich nicht um das letztmögliche Endfeld handelt, gelten <text:span text:style-name="T164">als </text:span><text:span text:style-name="T165">geschützt</text:span><text:span text:style-name="T164">.</text:span></text:p>
      <text:p text:style-name="P30"/>
      <text:p text:style-name="P31"><text:span text:style-name="T1">#3</text:span> Regeln</text:p>
      <text:p text:style-name="P32"/>
      <text:p text:style-name="P33">Außer de<text:span text:style-name="T166">m</text:span> oben genannten, gibt es auch noch spezifischerne <text:span text:style-name="T167">allgemeingeltende </text:span>Regeln, welche teilweise nur in Ausnahmefällen relevant werden.</text:p>
      <text:p text:style-name="P33"/>
      <text:list text:style-name="L2">
        <text:list-item>
          <text:p text:style-name="P34">Sechser-Regel<text:span text:style-name="T34">: </text:span><text:span text:style-name="T168">Wenn eine </text:span><text:span text:style-name="T169">Sechs (</text:span><text:span text:style-name="T170">⚅</text:span><text:span text:style-name="T169">) gewürfelt wurde, darf der kontrollierende Spieler </text:span><text:span text:style-name="T171">entweder eine Figur </text:span><text:span text:style-name="T172">seiner </text:span><text:span text:style-name="T173">Farbe </text:span><text:span text:style-name="T171">um sechs Felder nach vorne bewegen, oder eine </text:span><text:span text:style-name="T173">Figur seiner Farbe </text:span><text:span text:style-name="T174">vom Heimfeld ins </text:span><text:span text:style-name="T175">Startfeld seiner Farbe geben</text:span><text:span text:style-name="T171">. Solange beides möglich ist, darf sich der Spieler </text:span><text:span text:style-name="T176">dies </text:span><text:span text:style-name="T171">aussuchen. </text:span><text:span text:style-name="T177">Danach, solange alle daraus </text:span><text:span text:style-name="T178">folgenden</text:span><text:span text:style-name="T177"> Events </text:span><text:span text:style-name="T179">abgeschlossen sind, </text:span><text:span text:style-name="T180">bekommt der Spieler einen zweiten Würfelwurf,</text:span><text:span text:style-name="T181"> </text:span><text:span text:style-name="T182">welcher </text:span><text:span text:style-name="T183">den selben Regeln wie ein normaler Würfelwurf </text:span><text:span text:style-name="T184">am Zuganfang</text:span><text:span text:style-name="T183"> </text:span><text:span text:style-name="T185">entspricht.</text:span></text:p>
          <text:p text:style-name="P35"/>
        </text:list-item>
        <text:list-item>
          <text:p text:style-name="P36">Alles-Inaktiv-Regel<text:span text:style-name="T34">: </text:span><text:span text:style-name="T186">Wenn am Zuganfang alle Figuren der eigenen Farbe als inaktiv gelten, also </text:span><text:span text:style-name="T187">in einem Heimfeld oder letztmöglichen Endfeld liegen, </text:span><text:span text:style-name="T188">darf der solange würfeln, bis die </text:span><text:span text:style-name="T189">Sechser-Regel</text:span><text:span text:style-name="T188"> in Kraft tritt, </text:span><text:span text:style-name="T190">oder</text:span><text:span text:style-name="T188"> maximal drei mal. </text:span></text:p>
          <text:p text:style-name="P37"/>
        </text:list-item>
        <text:list-item>
          <text:p text:style-name="P37"><text:span text:style-name="T38">Spring-Zurück-Regel</text:span>: <text:span text:style-name="T191">Wenn ein Barrierenfeld, also das letztmögliche Endfeld oder bei verkehrter Richtung das Startfeld, der eigenen Farbe passiert werden würde, </text:span><text:span text:style-name="T192">muss</text:span><text:span text:style-name="T191"> stattdessen </text:span><text:span text:style-name="T193">der </text:span><text:span text:style-name="T191">Überschuss an Feldern in die entgegenges</text:span><text:span text:style-name="T194">e</text:span><text:span text:style-name="T191">tzte Richtung </text:span><text:span text:style-name="T195">bewegt werden</text:span><text:span text:style-name="T191">. </text:span></text:p>
          <text:p text:style-name="P38"/>
        </text:list-item>
        <text:list-item>
          <text:p text:style-name="P39">Besonderer Würfelwurf<text:span text:style-name="T34">: </text:span><text:span text:style-name="T196">Liegt ein </text:span><text:span text:style-name="T197">besonderer Würfelwurf</text:span><text:span text:style-name="T196"> vor, so gelten nur die jeweils vorgelegenen Regeln, und nicht die Allgemeinregeln </text:span><text:span text:style-name="T198">für diesem Würfelwurf. </text:span><text:span text:style-name="T199">Das heißt, dass bei bspw. einem Eigenevent der zugehörige Würfelwurf nur dafür gilt, dieser nicht für allgemeine Figurenbewegung verwendbar ist und die </text:span><text:span text:style-name="T200">Sechser-Regel</text:span><text:span text:style-name="T199"> nicht anwendbar ist.</text:span></text:p>
        </text:list-item>
      </text:list>
      <text:p text:style-name="P40"/>
      <text:p text:style-name="P41"><text:span text:style-name="T1">#4</text:span> <text:span text:style-name="T201">Objekte</text:span></text:p>
      <text:p text:style-name="P42"/>
      <text:p text:style-name="P43">todo</text:p>
      <text:p text:style-name="P44"/>
      <text:p text:style-name="P45"><text:span text:style-name="T1">#5</text:span> Figuren</text:p>
      <text:p text:style-name="P44"/>
      <text:p text:style-name="P46">todo</text:p>
      <text:p text:style-name="P44"><text:soft-page-break/></text:p>
      <text:p text:style-name="P47"><text:span text:style-name="T1">#6</text:span> <text:span text:style-name="T201">Events</text:span></text:p>
      <text:p text:style-name="P44"/>
      <text:p text:style-name="P48">to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xx" style:country-asian="none" style:font-name-complex="Lucida Sans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xx" style:country-asian="none" style:font-name-complex="Lucida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language="de" fo:country="A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text:s/>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3T11:11:37.430475800</meta:creation-date>
    <meta:generator>LibreOffice/25.8.3.2$Windows_X86_64 LibreOffice_project/8ca8d55c161d602844f5428fa4b58097424e324e</meta:generator>
    <dc:date>2026-01-26T09:49:47.196221400</dc:date>
    <meta:editing-duration>PT5H44M43S</meta:editing-duration>
    <meta:editing-cycles>241</meta:editing-cycles>
    <meta:document-statistic meta:table-count="0" meta:image-count="6" meta:object-count="0" meta:page-count="4" meta:paragraph-count="41" meta:word-count="1173" meta:character-count="7815" meta:non-whitespace-character-count="6680"/>
  </office:meta>
</office:document-meta>
</file>